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3.025cm"/>
    </style:style>
    <style:style style:name="co5" style:family="table-column">
      <style:table-column-properties fo:break-before="auto" style:column-width="2.473cm"/>
    </style:style>
    <style:style style:name="co6" style:family="table-column">
      <style:table-column-properties fo:break-before="auto" style:column-width="2.498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3.103cm"/>
    </style:style>
    <style:style style:name="co9" style:family="table-column">
      <style:table-column-properties fo:break-before="auto" style:column-width="2.8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84cm" fo:break-before="auto" style:use-optimal-row-height="fals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Максимальный показатель</text:p>
          </table:table-cell>
          <table:table-cell table:style-name="ce1"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95" calcext:value-type="float">
            <text:p>409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91" calcext:value-type="float">
            <text:p>81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383" calcext:value-type="float">
            <text:p>1638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1071" calcext:value-type="float">
            <text:p>13107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2143" calcext:value-type="float">
            <text:p>26214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4287" calcext:value-type="float">
            <text:p>52428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48575" calcext:value-type="float">
            <text:p>10485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97151" calcext:value-type="float">
            <text:p>209715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94303" calcext:value-type="float">
            <text:p>419430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388607" calcext:value-type="float">
            <text:p>838860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777215" calcext:value-type="float">
            <text:p>16777215</text:p>
          </table:table-cell>
        </table:table-row>
        <table:table-row table:style-name="ro2" table:number-rows-repeated="1048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Лист2" table:style-name="ta2">
        <table:table-column table:style-name="co1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Максимальный показатель</text:p>
          </table:table-cell>
          <table:table-cell table:style-name="ce1"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23016601" calcext:value-type="float">
            <text:p>52301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1214768240" calcext:value-type="float">
            <text:p>141214768240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Лист3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3">
          <table:table-cell office:value-type="string" calcext:value-type="string">
            <text:p>Максимальный показатель</text:p>
          </table:table-cell>
          <table:table-cell table:style-name="ce1" office:value-type="string" calcext:value-type="string">
            <text:p>Сумма для 2</text:p>
          </table:table-cell>
          <table:table-cell table:style-name="Default" office:value-type="string" calcext:value-type="string">
            <text:p>Сумма для 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VLOOKUP([.A2];[$Лист1.$A$2:.$B$25]; 2; 0)" office:value-type="float" office:value="1" calcext:value-type="float">
            <text:p>1</text:p>
          </table:table-cell>
          <table:table-cell table:formula="of:=VLOOKUP([.A2];[$Лист2.$A$2:.$B$25]; 2; 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3];[$Лист1.$A$2:.$B$25]; 2; 0)" office:value-type="float" office:value="3" calcext:value-type="float">
            <text:p>3</text:p>
          </table:table-cell>
          <table:table-cell table:formula="of:=VLOOKUP([.A3];[$Лист2.$A$2:.$B$25]; 2; 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VLOOKUP([.A4];[$Лист1.$A$2:.$B$25]; 2; 0)" office:value-type="float" office:value="7" calcext:value-type="float">
            <text:p>7</text:p>
          </table:table-cell>
          <table:table-cell table:formula="of:=VLOOKUP([.A4];[$Лист2.$A$2:.$B$25]; 2; 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5];[$Лист1.$A$2:.$B$25]; 2; 0)" office:value-type="float" office:value="15" calcext:value-type="float">
            <text:p>15</text:p>
          </table:table-cell>
          <table:table-cell table:formula="of:=VLOOKUP([.A5];[$Лист2.$A$2:.$B$25]; 2; 0)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VLOOKUP([.A6];[$Лист1.$A$2:.$B$25]; 2; 0)" office:value-type="float" office:value="31" calcext:value-type="float">
            <text:p>31</text:p>
          </table:table-cell>
          <table:table-cell table:formula="of:=VLOOKUP([.A6];[$Лист2.$A$2:.$B$25]; 2; 0)"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7];[$Лист1.$A$2:.$B$25]; 2; 0)" office:value-type="float" office:value="63" calcext:value-type="float">
            <text:p>63</text:p>
          </table:table-cell>
          <table:table-cell table:formula="of:=VLOOKUP([.A7];[$Лист2.$A$2:.$B$25]; 2; 0)"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VLOOKUP([.A8];[$Лист1.$A$2:.$B$25]; 2; 0)" office:value-type="float" office:value="127" calcext:value-type="float">
            <text:p>127</text:p>
          </table:table-cell>
          <table:table-cell table:formula="of:=VLOOKUP([.A8];[$Лист2.$A$2:.$B$25]; 2; 0)"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VLOOKUP([.A9];[$Лист1.$A$2:.$B$25]; 2; 0)" office:value-type="float" office:value="255" calcext:value-type="float">
            <text:p>255</text:p>
          </table:table-cell>
          <table:table-cell table:formula="of:=VLOOKUP([.A9];[$Лист2.$A$2:.$B$25]; 2; 0)"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10];[$Лист1.$A$2:.$B$25]; 2; 0)" office:value-type="float" office:value="511" calcext:value-type="float">
            <text:p>511</text:p>
          </table:table-cell>
          <table:table-cell table:formula="of:=VLOOKUP([.A10];[$Лист2.$A$2:.$B$25]; 2; 0)"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1];[$Лист1.$A$2:.$B$25]; 2; 0)" office:value-type="float" office:value="1023" calcext:value-type="float">
            <text:p>1023</text:p>
          </table:table-cell>
          <table:table-cell table:formula="of:=VLOOKUP([.A11];[$Лист2.$A$2:.$B$25]; 2; 0)"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];[$Лист1.$A$2:.$B$25]; 2; 0)" office:value-type="float" office:value="2047" calcext:value-type="float">
            <text:p>2047</text:p>
          </table:table-cell>
          <table:table-cell table:formula="of:=VLOOKUP([.A12];[$Лист2.$A$2:.$B$25]; 2; 0)"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VLOOKUP([.A13];[$Лист1.$A$2:.$B$25]; 2; 0)" office:value-type="float" office:value="4095" calcext:value-type="float">
            <text:p>4095</text:p>
          </table:table-cell>
          <table:table-cell table:formula="of:=VLOOKUP([.A13];[$Лист2.$A$2:.$B$25]; 2; 0)"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4];[$Лист1.$A$2:.$B$25]; 2; 0)" office:value-type="float" office:value="8191" calcext:value-type="float">
            <text:p>8191</text:p>
          </table:table-cell>
          <table:table-cell table:formula="of:=VLOOKUP([.A14];[$Лист2.$A$2:.$B$25]; 2; 0)"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5];[$Лист1.$A$2:.$B$25]; 2; 0)" office:value-type="float" office:value="16383" calcext:value-type="float">
            <text:p>16383</text:p>
          </table:table-cell>
          <table:table-cell table:formula="of:=VLOOKUP([.A15];[$Лист2.$A$2:.$B$25]; 2; 0)"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16];[$Лист1.$A$2:.$B$25]; 2; 0)" office:value-type="float" office:value="32767" calcext:value-type="float">
            <text:p>32767</text:p>
          </table:table-cell>
          <table:table-cell table:formula="of:=VLOOKUP([.A16];[$Лист2.$A$2:.$B$25]; 2; 0)"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VLOOKUP([.A17];[$Лист1.$A$2:.$B$25]; 2; 0)" office:value-type="float" office:value="65535" calcext:value-type="float">
            <text:p>65535</text:p>
          </table:table-cell>
          <table:table-cell table:formula="of:=VLOOKUP([.A17];[$Лист2.$A$2:.$B$25]; 2; 0)"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18];[$Лист1.$A$2:.$B$25]; 2; 0)" office:value-type="float" office:value="131071" calcext:value-type="float">
            <text:p>131071</text:p>
          </table:table-cell>
          <table:table-cell table:formula="of:=VLOOKUP([.A18];[$Лист2.$A$2:.$B$25]; 2; 0)"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VLOOKUP([.A19];[$Лист1.$A$2:.$B$25]; 2; 0)" office:value-type="float" office:value="262143" calcext:value-type="float">
            <text:p>262143</text:p>
          </table:table-cell>
          <table:table-cell table:formula="of:=VLOOKUP([.A19];[$Лист2.$A$2:.$B$25]; 2; 0)"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0];[$Лист1.$A$2:.$B$25]; 2; 0)" office:value-type="float" office:value="524287" calcext:value-type="float">
            <text:p>524287</text:p>
          </table:table-cell>
          <table:table-cell table:formula="of:=VLOOKUP([.A20];[$Лист2.$A$2:.$B$25]; 2; 0)"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.A21];[$Лист1.$A$2:.$B$25]; 2; 0)" office:value-type="float" office:value="1048575" calcext:value-type="float">
            <text:p>1048575</text:p>
          </table:table-cell>
          <table:table-cell table:formula="of:=VLOOKUP([.A21];[$Лист2.$A$2:.$B$25]; 2; 0)"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22];[$Лист1.$A$2:.$B$25]; 2; 0)" office:value-type="float" office:value="2097151" calcext:value-type="float">
            <text:p>2097151</text:p>
          </table:table-cell>
          <table:table-cell table:formula="of:=VLOOKUP([.A22];[$Лист2.$A$2:.$B$25]; 2; 0)" office:value-type="float" office:value="523016601" calcext:value-type="float">
            <text:p>52301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23];[$Лист1.$A$2:.$B$25]; 2; 0)" office:value-type="float" office:value="4194303" calcext:value-type="float">
            <text:p>4194303</text:p>
          </table:table-cell>
          <table:table-cell table:formula="of:=VLOOKUP([.A23];[$Лист2.$A$2:.$B$25]; 2; 0)"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24];[$Лист1.$A$2:.$B$25]; 2; 0)" office:value-type="float" office:value="8388607" calcext:value-type="float">
            <text:p>8388607</text:p>
          </table:table-cell>
          <table:table-cell table:formula="of:=VLOOKUP([.A24];[$Лист2.$A$2:.$B$25]; 2; 0)"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VLOOKUP([.A25];[$Лист1.$A$2:.$B$25]; 2; 0)" office:value-type="float" office:value="16777215" calcext:value-type="float">
            <text:p>16777215</text:p>
          </table:table-cell>
          <table:table-cell table:formula="of:=VLOOKUP([.A25];[$Лист2.$A$2:.$B$25]; 2; 0)" office:value-type="float" office:value="141214768240" calcext:value-type="float">
            <text:p>141214768240</text:p>
          </table:table-cell>
        </table:table-row>
      </table:table>
      <table:table table:name="Лист4" table:style-name="ta2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string" calcext:value-type="string">
            <text:p>Статистическая функция</text:p>
          </table:table-cell>
          <table:table-cell office:value-type="string" calcext:value-type="string">
            <text:p>Для A (Лист 3)</text:p>
          </table:table-cell>
          <table:table-cell office:value-type="string" calcext:value-type="string">
            <text:p>Для B (Лист 3)</text:p>
          </table:table-cell>
          <table:table-cell office:value-type="string" calcext:value-type="string">
            <text:p>Для C (Лист 3)</text:p>
          </table:table-cell>
        </table:table-row>
        <table:table-row table:style-name="ro2">
          <table:table-cell office:value-type="string" calcext:value-type="string">
            <text:p>Среднее значение</text:p>
          </table:table-cell>
          <table:table-cell table:formula="of:=AVERAGE([$Лист3.A2:.A25])" office:value-type="float" office:value="11.5" calcext:value-type="float">
            <text:p>11,5</text:p>
          </table:table-cell>
          <table:table-cell table:formula="of:=AVERAGE([$Лист3.C2:.C25])" office:value-type="float" office:value="8629791347.83333" calcext:value-type="float">
            <text:p>8629791347,83333</text:p>
          </table:table-cell>
          <table:table-cell table:formula="of:=AVERAGE([$Лист3.B2:.B25])" office:value-type="float" office:value="1398100.25" calcext:value-type="float">
            <text:p>1398100,25</text:p>
          </table:table-cell>
        </table:table-row>
        <table:table-row table:style-name="ro2">
          <table:table-cell office:value-type="string" calcext:value-type="string">
            <text:p>Максимальное значение</text:p>
          </table:table-cell>
          <table:table-cell table:formula="of:=AVERAGE([$Лист3.A3:.A26])" office:value-type="float" office:value="12" calcext:value-type="float">
            <text:p>12</text:p>
          </table:table-cell>
          <table:table-cell table:formula="of:=AVERAGE([$Лист3.C3:.C26])" office:value-type="float" office:value="9004999667.26087" calcext:value-type="float">
            <text:p>9004999667,26087</text:p>
          </table:table-cell>
          <table:table-cell table:formula="of:=AVERAGE([$Лист3.B3:.B26])" office:value-type="float" office:value="1458887.17391304" calcext:value-type="float">
            <text:p>1458887,17391304</text:p>
          </table:table-cell>
        </table:table-row>
        <table:table-row table:style-name="ro2">
          <table:table-cell office:value-type="string" calcext:value-type="string">
            <text:p>Минимальное значение</text:p>
          </table:table-cell>
          <table:table-cell table:formula="of:=AVERAGE([$Лист3.A4:.A27])" office:value-type="float" office:value="12.5" calcext:value-type="float">
            <text:p>12,5</text:p>
          </table:table-cell>
          <table:table-cell table:formula="of:=AVERAGE([$Лист3.C4:.C27])" office:value-type="float" office:value="9414317833.77273" calcext:value-type="float">
            <text:p>9414317833,77273</text:p>
          </table:table-cell>
          <table:table-cell table:formula="of:=AVERAGE([$Лист3.B4:.B27])" office:value-type="float" office:value="1525200.09090909" calcext:value-type="float">
            <text:p>1525200,09090909</text:p>
          </table:table-cell>
        </table:table-row>
        <table:table-row table:style-name="ro2">
          <table:table-cell office:value-type="string" calcext:value-type="string">
            <text:p>Медиана</text:p>
          </table:table-cell>
          <table:table-cell table:formula="of:=AVERAGE([$Лист3.A5:.A28])" office:value-type="float" office:value="13" calcext:value-type="float">
            <text:p>13</text:p>
          </table:table-cell>
          <table:table-cell table:formula="of:=AVERAGE([$Лист3.C5:.C28])" office:value-type="float" office:value="9862618682.38095" calcext:value-type="float">
            <text:p>9862618682,38095</text:p>
          </table:table-cell>
          <table:table-cell table:formula="of:=AVERAGE([$Лист3.B5:.B28])" office:value-type="float" office:value="1597828.33333333" calcext:value-type="float">
            <text:p>1597828,33333333</text:p>
          </table:table-cell>
        </table:table-row>
        <table:table-row table:style-name="ro2">
          <table:table-cell office:value-type="string" calcext:value-type="string">
            <text:p>Мода</text:p>
          </table:table-cell>
          <table:table-cell table:formula="of:=AVERAGE([$Лист3.A6:.A29])" office:value-type="float" office:value="13.5" calcext:value-type="float">
            <text:p>13,5</text:p>
          </table:table-cell>
          <table:table-cell table:formula="of:=AVERAGE([$Лист3.C6:.C29])" office:value-type="float" office:value="10355749614.5" calcext:value-type="float">
            <text:p>10355749614,5</text:p>
          </table:table-cell>
          <table:table-cell table:formula="of:=AVERAGE([$Лист3.B6:.B29])" office:value-type="float" office:value="1677719" calcext:value-type="float">
            <text:p>1677719</text:p>
          </table:table-cell>
        </table:table-row>
        <table:table-row table:style-name="ro2">
          <table:table-cell office:value-type="string" calcext:value-type="string">
            <text:p>Дисперсия</text:p>
          </table:table-cell>
          <table:table-cell table:formula="of:=AVERAGE([$Лист3.A7:.A30])" office:value-type="float" office:value="14" calcext:value-type="float">
            <text:p>14</text:p>
          </table:table-cell>
          <table:table-cell table:formula="of:=AVERAGE([$Лист3.C7:.C30])" office:value-type="float" office:value="10900789061.5263" calcext:value-type="float">
            <text:p>10900789061,5263</text:p>
          </table:table-cell>
          <table:table-cell table:formula="of:=AVERAGE([$Лист3.B7:.B30])" office:value-type="float" office:value="1766018.36842105" calcext:value-type="float">
            <text:p>1766018,36842105</text:p>
          </table:table-cell>
        </table:table-row>
      </table:table>
      <table:table table:name="Лист5" table:style-name="ta2">
        <table:table-column table:style-name="co2" table:number-columns-repeated="7" table:default-cell-style-name="Default"/>
        <table:table-row table:style-name="ro2">
          <table:table-cell/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Колледж 1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1934765" calcext:value-type="float">
            <text:p>1934765</text:p>
          </table:table-cell>
          <table:table-cell office:value-type="float" office:value="4543534" calcext:value-type="float">
            <text:p>4543534</text:p>
          </table:table-cell>
          <table:table-cell office:value-type="float" office:value="2348887" calcext:value-type="float">
            <text:p>2348887</text:p>
          </table:table-cell>
          <table:table-cell office:value-type="float" office:value="1170004" calcext:value-type="float">
            <text:p>1170004</text:p>
          </table:table-cell>
          <table:table-cell office:value-type="float" office:value="2344598" calcext:value-type="float">
            <text:p>2344598</text:p>
          </table:table-cell>
        </table:table-row>
        <table:table-row table:style-name="ro2">
          <table:table-cell office:value-type="string" calcext:value-type="string">
            <text:p>Колледж 2</text:p>
          </table:table-cell>
          <table:table-cell table:style-name="ce2" office:value-type="float" office:value="237800" calcext:value-type="float">
            <text:p>237800</text:p>
          </table:table-cell>
          <table:table-cell office:value-type="float" office:value="567672" calcext:value-type="float">
            <text:p>567672</text:p>
          </table:table-cell>
          <table:table-cell office:value-type="float" office:value="234234" calcext:value-type="float">
            <text:p>234234</text:p>
          </table:table-cell>
          <table:table-cell office:value-type="float" office:value="323217" calcext:value-type="float">
            <text:p>323217</text:p>
          </table:table-cell>
          <table:table-cell office:value-type="float" office:value="634423" calcext:value-type="float">
            <text:p>634423</text:p>
          </table:table-cell>
          <table:table-cell office:value-type="float" office:value="235455" calcext:value-type="float">
            <text:p>235455</text:p>
          </table:table-cell>
        </table:table-row>
        <table:table-row table:style-name="ro2">
          <table:table-cell office:value-type="string" calcext:value-type="string">
            <text:p>Колледж 3</text:p>
          </table:table-cell>
          <table:table-cell table:style-name="ce2" office:value-type="float" office:value="3211400" calcext:value-type="float">
            <text:p>3211400</text:p>
          </table:table-cell>
          <table:table-cell office:value-type="float" office:value="3654654" calcext:value-type="float">
            <text:p>3654654</text:p>
          </table:table-cell>
          <table:table-cell office:value-type="float" office:value="3453453" calcext:value-type="float">
            <text:p>3453453</text:p>
          </table:table-cell>
          <table:table-cell office:value-type="float" office:value="5435323" calcext:value-type="float">
            <text:p>5435323</text:p>
          </table:table-cell>
          <table:table-cell office:value-type="float" office:value="4586959" calcext:value-type="float">
            <text:p>4586959</text:p>
          </table:table-cell>
          <table:table-cell office:value-type="float" office:value="8576885" calcext:value-type="float">
            <text:p>8576885</text:p>
          </table:table-cell>
        </table:table-row>
        <table:table-row table:style-name="ro2">
          <table:table-cell office:value-type="string" calcext:value-type="string">
            <text:p>Колледж 4</text:p>
          </table:table-cell>
          <table:table-cell office:value-type="float" office:value="4961201" calcext:value-type="float">
            <text:p>4961201</text:p>
          </table:table-cell>
          <table:table-cell office:value-type="float" office:value="6159094" calcext:value-type="float">
            <text:p>6159094</text:p>
          </table:table-cell>
          <table:table-cell office:value-type="float" office:value="8233225" calcext:value-type="float">
            <text:p>8233225</text:p>
          </table:table-cell>
          <table:table-cell office:value-type="float" office:value="8109432" calcext:value-type="float">
            <text:p>8109432</text:p>
          </table:table-cell>
          <table:table-cell office:value-type="float" office:value="6393392" calcext:value-type="float">
            <text:p>6393392</text:p>
          </table:table-cell>
          <table:table-cell office:value-type="float" office:value="11158945" calcext:value-type="float">
            <text:p>11158945</text:p>
          </table:table-cell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4">
          <table:table-cell>
            <draw:frame draw:z-index="0" draw:name="внедрённый объект (OLE) 1" draw:style-name="gr1" draw:text-style-name="P1" svg:width="13.122cm" svg:height="7.872cm" svg:x="0.558cm" svg:y="0.29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.00.0000</text:date>, <text:time style:data-style-name="N2" text:time-value="11:01:52.29905147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1:01:52.512286378</meta:creation-date>
    <dc:title>Таблица</dc:title>
    <meta:generator>LibreOffice/7.6.7.2$Linux_X86_64 LibreOffice_project/60$Build-2</meta:generator>
    <meta:editing-duration>PT1H46M15S</meta:editing-duration>
    <meta:editing-cycles>2</meta:editing-cycles>
    <dc:date>2026-05-21T12:48:07.232656171</dc:date>
    <meta:document-statistic meta:table-count="5" meta:cell-count="237" meta:object-count="1"/>
    <meta:template xlink:type="simple" xlink:actuate="onRequest" xlink:title="Таблица" xlink:href="../../../../usr/lib/libreoffice/share/template/common/ШАБЛОН_ЭЛЕКТРОННОЙ_ТАБЛИЦЫ_2019-07-22.ots" meta:date="2026-05-21T11:01:52.3664569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symbol-type="automatic" chart:include-hidden-cells="fals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123cm" svg:height="7.873cm" xlink:href="." xlink:type="simple" chart:class="chart:line" chart:style-name="ch1">
        <chart:title svg:x="4.156cm" svg:y="0.399cm" chart:style-name="ch2">
          <text:p>Заглавие диаграммы</text:p>
        </chart:title>
        <chart:legend chart:legend-position="bottom" svg:x="1.429cm" svg:y="7.301cm" style:legend-expansion="wide" chart:style-name="ch3"/>
        <chart:plot-area chart:style-name="ch4" chart:data-source-has-labels="both" svg:x="0.317cm" svg:y="1.53cm" svg:width="12.218cm" svg:height="5.496cm">
          <chart:coordinate-region svg:x="1.688cm" svg:y="1.716cm" svg:width="10.847cm" svg:height="4.84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series chart:style-name="ch10" chart:values-cell-range-address="local-table.$D$2:.$D$8" chart:label-cell-address="local-table.$D$1" chart:class="chart:line">
            <chart:data-point chart:repeated="7"/>
          </chart:series>
          <chart:series chart:style-name="ch11" chart:values-cell-range-address="local-table.$E$2:.$E$8" chart:label-cell-address="local-table.$E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оледж 1</text:p>
              </table:table-cell>
              <table:table-cell office:value-type="string">
                <text:p>Кооледж 2</text:p>
              </table:table-cell>
              <table:table-cell office:value-type="string">
                <text:p>Кооледж 3</text:p>
              </table:table-cell>
              <table:table-cell office:value-type="string">
                <text:p>Кооледж 4</text:p>
              </table:table-cell>
            </table:table-row>
          </table:table-header-rows>
          <table:table-rows>
            <table:table-row>
              <table:table-cell office:value-type="string">
                <text:p>2021</text:p>
              </table:table-cell>
              <table:table-cell office:value-type="float" office:value="1510000">
                <text:p>1510000</text:p>
              </table:table-cell>
              <table:table-cell office:value-type="float" office:value="237800">
                <text:p>237800</text:p>
              </table:table-cell>
              <table:table-cell office:value-type="float" office:value="3211400">
                <text:p>3211400</text:p>
              </table:table-cell>
              <table:table-cell office:value-type="float" office:value="4961201">
                <text:p>496120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236476">
                <text:p>2236476</text:p>
              </table:table-cell>
              <table:table-cell office:value-type="float" office:value="732647">
                <text:p>732647</text:p>
              </table:table-cell>
              <table:table-cell office:value-type="float" office:value="4873837">
                <text:p>4873837</text:p>
              </table:table-cell>
              <table:table-cell office:value-type="float" office:value="7844962">
                <text:p>784496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34765">
                <text:p>1934765</text:p>
              </table:table-cell>
              <table:table-cell office:value-type="float" office:value="567672">
                <text:p>567672</text:p>
              </table:table-cell>
              <table:table-cell office:value-type="float" office:value="3654654">
                <text:p>3654654</text:p>
              </table:table-cell>
              <table:table-cell office:value-type="float" office:value="6159094">
                <text:p>615909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4543534">
                <text:p>4543534</text:p>
              </table:table-cell>
              <table:table-cell office:value-type="float" office:value="234234">
                <text:p>234234</text:p>
              </table:table-cell>
              <table:table-cell office:value-type="float" office:value="3453453">
                <text:p>3453453</text:p>
              </table:table-cell>
              <table:table-cell office:value-type="float" office:value="8233225">
                <text:p>823322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348887">
                <text:p>2348887</text:p>
              </table:table-cell>
              <table:table-cell office:value-type="float" office:value="323217">
                <text:p>323217</text:p>
              </table:table-cell>
              <table:table-cell office:value-type="float" office:value="5435323">
                <text:p>5435323</text:p>
              </table:table-cell>
              <table:table-cell office:value-type="float" office:value="8109432">
                <text:p>810943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170004">
                <text:p>1170004</text:p>
              </table:table-cell>
              <table:table-cell office:value-type="float" office:value="634423">
                <text:p>634423</text:p>
              </table:table-cell>
              <table:table-cell office:value-type="float" office:value="4586959">
                <text:p>4586959</text:p>
              </table:table-cell>
              <table:table-cell office:value-type="float" office:value="6393392">
                <text:p>639339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344598">
                <text:p>2344598</text:p>
              </table:table-cell>
              <table:table-cell office:value-type="float" office:value="235455">
                <text:p>235455</text:p>
              </table:table-cell>
              <table:table-cell office:value-type="float" office:value="8576885">
                <text:p>8576885</text:p>
              </table:table-cell>
              <table:table-cell office:value-type="float" office:value="11158945">
                <text:p>1115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